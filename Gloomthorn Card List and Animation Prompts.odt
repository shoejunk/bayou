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Lucida_Sans_1.ttf" manifest:media-type="application/x-font-ttf"/>
  <manifest:file-entry manifest:full-path="Fonts/Font_Lucida_Sans_2.ttf" manifest:media-type="application/x-font-ttf"/>
  <manifest:file-entry manifest:full-path="Fonts/Font_Lucida_Sans_3.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3.ttf" xlink:type="simple" loext:font-style="italic" loext:font-weight="normal">
          <svg:font-face-format svg:string="truetype"/>
        </svg:font-face-uri>
      </svg:font-face-src>
    </style:font-fac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master-page-name="Standard">
      <style:paragraph-properties style:page-number="1"/>
    </style:style>
    <style:style style:name="P2" style:family="paragraph" style:parent-style-name="normal">
      <style:text-properties fo:font-size="15pt" style:font-size-asian="15pt" style:font-size-complex="15pt"/>
    </style:style>
    <style:style style:name="P3" style:family="paragraph" style:parent-style-name="normal">
      <style:text-properties fo:font-size="13pt" fo:font-weight="bold" style:font-size-asian="13pt" style:font-weight-asian="bold" style:font-size-complex="13pt" style:font-weight-complex="bold"/>
    </style:style>
    <style:style style:name="P4" style:family="paragraph" style:parent-style-name="normal">
      <style:text-properties fo:font-size="15pt" fo:font-weight="bold" style:font-size-asian="15pt" style:font-weight-asian="bold" style:font-size-complex="15pt" style:font-weight-complex="bold"/>
    </style:style>
    <style:style style:name="P5" style:family="paragraph" style:parent-style-name="normal" style:list-style-name="WWNum7">
      <style:paragraph-properties fo:margin-left="0.5in" fo:text-indent="-0.25in" style:auto-text-indent="false"/>
    </style:style>
    <style:style style:name="P6" style:family="paragraph" style:parent-style-name="normal" style:list-style-name="WWNum5">
      <style:paragraph-properties fo:margin-left="0.5in" fo:text-indent="-0.25in" style:auto-text-indent="false"/>
    </style:style>
    <style:style style:name="P7" style:family="paragraph" style:parent-style-name="normal" style:list-style-name="WWNum1">
      <style:paragraph-properties fo:margin-left="0.5in" fo:text-indent="-0.25in" style:auto-text-indent="false"/>
    </style:style>
    <style:style style:name="P8" style:family="paragraph" style:parent-style-name="normal">
      <style:text-properties fo:font-size="12pt" style:font-size-asian="12pt" style:font-size-complex="12pt"/>
    </style:style>
    <style:style style:name="P9" style:family="paragraph" style:parent-style-name="normal">
      <style:text-properties fo:font-size="13pt" style:font-size-asian="13pt" style:font-size-complex="13pt"/>
    </style:style>
    <style:style style:name="P10" style:family="paragraph" style:parent-style-name="normal" style:list-style-name="WWNum2">
      <style:paragraph-properties fo:margin-left="0.5in" fo:text-indent="-0.25in" style:auto-text-indent="false"/>
    </style:style>
    <style:style style:name="P11" style:family="paragraph" style:parent-style-name="normal" style:list-style-name="WWNum6">
      <style:paragraph-properties fo:margin-left="0.5in" fo:text-indent="-0.25in" style:auto-text-indent="false"/>
    </style:style>
    <style:style style:name="P12" style:family="paragraph" style:parent-style-name="normal" style:list-style-name="WWNum4">
      <style:paragraph-properties fo:margin-left="0.5in" fo:text-indent="-0.25in" style:auto-text-indent="false"/>
    </style:style>
    <style:style style:name="P13" style:family="paragraph" style:parent-style-name="normal" style:list-style-name="WWNum3">
      <style:paragraph-properties fo:margin-left="0.5in" fo:text-indent="-0.25in" style:auto-text-indent="false"/>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5pt" style:font-size-asian="15pt" style:font-size-complex="15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3pt" style:font-size-asian="13pt" style:font-size-complex="13pt"/>
    </style:style>
    <style:style style:name="T6" style:family="text">
      <style:text-properties style:text-underline-style="none"/>
    </style:style>
    <style:style style:name="T7"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Gloomthorn</text:span><text:span text:style-name="T1"/></text:p>
      <text:p text:style-name="P2" loext:marker-style-name="T2"/>
      <text:p text:style-name="normal" loext:marker-style-name="T3"><text:span text:style-name="T3">Art and Animation Commands:</text:span><text:span text:style-name="T3"/></text:p>
      <text:p text:style-name="normal"/>
      <text:p text:style-name="normal" loext:marker-style-name="T4"><text:span text:style-name="T4">Card Art</text:span><text:span text:style-name="T4"/></text:p>
      <text:p text:style-name="normal"/>
      <text:p text:style-name="normal">Initial Card Art:</text:p>
      <text:p text:style-name="normal">I need a square format card art in the style of modern high fantasy ccg art (just the art without card border etc) of a ____________. There should be a Bayou/Cajun influence while still staying true to fantasy roots. It should have a background appropriate for where they might be found hanging out. Use smooth, clean, simplified material surfaces. Avoid indiscriminate and excessive use of tiny rivets, studs, nail heads, beads, dot textures, speckles, pockmarks, excessive stitches, micro-scratches, and noisy high-frequency detail. In general, use larger readable shapes and broad clean forms instead. </text:p>
      <text:p text:style-name="normal"/>
      <text:p text:style-name="normal">Forward-Facing Card Art:</text:p>
      <text:p text:style-name="normal">Redraw this with the character standing straight forward toward the camera. Their head/face, chest, pelvis, knees, and feet should be in line with the rest of the body, looking straight at the viewer. </text:p>
      <text:p text:style-name="normal"/>
      <text:p text:style-name="normal" loext:marker-style-name="T4"><text:span text:style-name="T4">Sprites</text:span><text:span text:style-name="T4"/></text:p>
      <text:p text:style-name="P3" loext:marker-style-name="T4"/>
      <text:p text:style-name="normal">Initial Sprite Creation:</text:p>
      <text:p text:style-name="normal">I need a 2D sprite image with a transparent background to be used as a unit piece to represent this character on a Tccg game board. No base. Keep the unit looking streamlined. They should be in a standing and waiting, but still battle-ready pose. It should be seen from a 2/3 view top-down perspective, as if we’re looking down on this unit on a game board from above. They should be looking forward toward the camera in the same direction their body is facing (The face should be pointing in the same direction as the torso). </text:p>
      <text:p text:style-name="normal"/>
      <text:p text:style-name="normal">Sprite POV turn:</text:p>
      <text:p text:style-name="normal">Rotate/reconstruct the whole character 45 degrees to the viewer’s right. We should see more of the character’s right side, including the right side of the face, right shoulder, right hip, right knee, and right foot. The facial centerline, sternum, belt buckle, pelvis, knees, and boots should all point 45 degrees to the viewer’s right. Do not keep the torso frontal. Do not turn only the head. No over-the-shoulder look. The viewpoint should be from a ⅔ angle from above.</text:p>
      <text:p text:style-name="normal"/>
      <text:p text:style-name="normal">Transparent Background:</text:p>
      <text:p text:style-name="normal">Redraw the character with a truly transparent background. Do not zoom in; if needed, zoom out slightly so the entire character and all accessories/weapons are fully visible. Do not crop anything off at the edges. Leave a small amount of empty transparent space on all sides. Preserve the same character, pose, angle, and overall look. </text:p>
      <text:p text:style-name="normal"><text:soft-page-break/></text:p>
      <text:p text:style-name="normal"/>
      <text:p text:style-name="normal"/>
      <text:p text:style-name="normal" loext:marker-style-name="T4"><text:span text:style-name="T4">Animations</text:span><text:span text:style-name="T4"/></text:p>
      <text:p text:style-name="P3" loext:marker-style-name="T4"/>
      <text:p text:style-name="normal">Walking: </text:p>
      <text:p text:style-name="normal">Animate this character walking forward in the same direction their body is facing, as a tactical board-game unit moving across a game board. Start from the standing battle-ready pose. Create a natural short walking loop with small, controlled steps. The character should remain alert and combat-ready while walking. The torso should have subtle weight shifts, the shoulders and hips should move naturally, and the arms should counterbalance the steps while preserving the weapon grip and silhouette. The feet should alternate clearly: one foot steps forward, weight transfers, then the other foot steps forward. Keep the stride compact and believable for a game-board sprite, not exaggerated or cartoony. The character should not slide, float, bounce excessively, or change direction. Preserve the same facing angle for the entire body, including head, chest, pelvis, knees, boots, and weapon. The animation should loop smoothly back into the original battle-ready stance. </text:p>
      <text:p text:style-name="normal"/>
      <text:p text:style-name="normal">Fidget:</text:p>
      <text:p text:style-name="normal">Animate a subtle idle fidget for this character while they remain standing in the same battle-ready position. The character should not walk, attack, cast, or change direction. The movement should be small and natural, as if waiting on a tactical game board: slight breathing motion, small weight shift, minor hand or weapon adjustment, subtle head or shoulder movement, and a return to the original stance. Keep the character centered in the 256x256 frame. Preserve the exact same facing direction, top-down board-game perspective, outfit, weapon, proportions, and silhouette. Do not make the animation too busy. Do not make the character bounce, dance, wave, or perform a major action. The fidget should loop smoothly and remain compatible with the standing battle-ready idle pose. </text:p>
      <text:p text:style-name="normal"/>
      <text:p text:style-name="normal">Attacking:</text:p>
      <text:p text:style-name="normal">Animate this character performing one quick battle-ready attack from the starting stance. The attack should begin in the same standing combat pose, shift the character’s weight forward, execute a clear strike, then recover back to the original stance. The feet should stay grounded with only a small step or weight shift and then back, if needed. The torso, shoulders, hips, and weapon should move together naturally. Do not spin the character around. Do not change the viewing angle. Do not make the character face the camera differently. Do not crop the weapon during the swing. Make the attack compact, readable, and not overly cinematic. End the final frame close to the original battle-ready pose so it can transition smoothly back into idle. The character’s head, torso, pelvis, knees, feet, and weapon should all stay aligned to the same facing direction. Do not rotate only the head. Do not change the camera angle. Leave a small amount of empty transparent space around the full character in every frame. </text:p>
      <text:p text:style-name="normal">***Swing: The weapon should swing in a controlled diagonal arc, with the body leaning into the strike and then recovering.</text:p>
      <text:p text:style-name="normal"><text:soft-page-break/>***Stab: The weapon should thrust forward in the same direction the character is facing, with a small forward weight shift and quick recovery.</text:p>
      <text:p text:style-name="normal">***Ranged: The character should raise or steady the ranged weapon, aim in the same direction the body is facing, release or fire once, recoil subtly, then return to the original battle-ready stance.</text:p>
      <text:p text:style-name="normal">***Magic: The character should gather energy briefly in the hands or weapon, release one clear magical attack forward in the direction the body is facing, then settle back into the original battle-ready stance. Keep magic effects simple and readable, not overly busy.</text:p>
      <text:p text:style-name="normal"/>
      <text:p text:style-name="normal">Killed:</text:p>
      <text:p text:style-name="normal">Animate this character collapsing to the ground and not getting up. The character should rapidly collapse naturally all the way down until they are flat against the ground, and not get up. Keep the fall readable from the same 2/3 or 3/4 top-down board-game perspective. The character should fall within the 256x256 frame without being cropped. Preserve the same character design, outfit, colors, proportions, and style throughout the animation. Do not make the character explode, disappear, turn into smoke, or change into a different pose instantly. Do not change the camera angle. Do not rotate the character into a side-view perspective. Do not make the final body position too large for the frame. The final frame should show the character fully defeated on the ground, still recognizable. </text:p>
      <text:p text:style-name="normal"/>
      <text:p text:style-name="normal">Damaged:</text:p>
      <text:p text:style-name="normal">Animate this character taking damage while standing in the same battle-ready position. Start from the original stance. The character should react to a hit with a quick flinch, slight recoil, brief loss of balance, then recover back into the battle-ready pose. The movement should be realistic and compact: shoulders tense, torso bends or twists slightly from the impact, knees flex, and the head reacts naturally while staying aligned with the body. Do not make the character fall down. Do not move the character far from the center of the 256x256 frame. Do not rotate the entire character to a new direction. Do not change the camera angle. The animation should clearly communicate “hit” or “damaged” without gore, excessive effects, or exaggerated cartoon motion. End close to the original stance so the character can continue fighting.</text:p>
      <text:p text:style-name="normal"/>
      <text:p text:style-name="normal"/>
      <text:p text:style-name="normal"/>
      <text:p text:style-name="normal"/>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normal" loext:marker-style-name="T3"><text:soft-page-break/><text:span text:style-name="T3">Card List:</text:span><text:span text:style-name="T3"/></text:p>
      <text:p text:style-name="normal"/>
      <text:p text:style-name="normal" loext:marker-style-name="T5"><text:span text:style-name="T5">Blackthorn Starter Deck</text:span><text:span text:style-name="T5"/></text:p>
      <text:p text:style-name="normal">Heroes:</text:p>
      <text:list xml:id="list1756522581" text:style-name="WWNum7">
        <text:list-item>
          <text:p text:style-name="P5" loext:marker-style-name="T6">Thaeron Baelstone<text:span text:style-name="T6"/></text:p>
        </text:list-item>
        <text:list-item>
          <text:p text:style-name="P5" loext:marker-style-name="T6">Victor Greyshard<text:span text:style-name="T6"/></text:p>
        </text:list-item>
        <text:list-item>
          <text:p text:style-name="P5" loext:marker-style-name="T6">Ashenfang<text:span text:style-name="T6"/></text:p>
        </text:list-item>
      </text:list>
      <text:p text:style-name="normal"/>
      <text:p text:style-name="normal">Combatant/Recruit:</text:p>
      <text:list xml:id="list1278099071" text:style-name="WWNum5">
        <text:list-item>
          <text:p text:style-name="P6" loext:marker-style-name="T6">Blackthorn Debt Collector<text:span text:style-name="T6"/></text:p>
        </text:list-item>
        <text:list-item>
          <text:p text:style-name="P6">Blackthorn Alchemist</text:p>
        </text:list-item>
        <text:list-item>
          <text:p text:style-name="P6">Blackthorn Foreman</text:p>
        </text:list-item>
        <text:list-item>
          <text:p text:style-name="P6">Blackthorn Lumberjack</text:p>
        </text:list-item>
        <text:list-item>
          <text:p text:style-name="P6" loext:marker-style-name="T6">Grove Sister<text:span text:style-name="T6"/></text:p>
        </text:list-item>
        <text:list-item>
          <text:p text:style-name="P6" loext:marker-style-name="T6">Mog<text:span text:style-name="T6"/></text:p>
        </text:list-item>
        <text:list-item>
          <text:p text:style-name="P6" loext:marker-style-name="T6">Grask<text:span text:style-name="T6"/></text:p>
        </text:list-item>
        <text:list-item>
          <text:p text:style-name="P6" loext:marker-style-name="T6">Fizzlewick Gearwright<text:span text:style-name="T6"/></text:p>
        </text:list-item>
        <text:list-item>
          <text:p text:style-name="P6" loext:marker-style-name="T6">Braun Stonefist<text:span text:style-name="T6"/></text:p>
        </text:list-item>
        <text:list-item>
          <text:p text:style-name="P6" loext:marker-style-name="T6">Goblin Sharpshooter<text:span text:style-name="T6"/></text:p>
        </text:list-item>
      </text:list>
      <text:p text:style-name="normal"/>
      <text:p text:style-name="normal">Blackthorn Non-Starter Cards:</text:p>
      <text:list text:style-name="WWNum1">
        <text:list-item>
          <text:p text:style-name="P7" loext:marker-style-name="T6">Lumber Automaton<text:span text:style-name="T6"/></text:p>
        </text:list-item>
        <text:list-item>
          <text:p text:style-name="P7" loext:marker-style-name="T6">Clockwork Guardian (robot dog)<text:span text:style-name="T6"/></text:p>
        </text:list-item>
        <text:list-item>
          <text:p text:style-name="P7" loext:marker-style-name="T6">Blackthorn Houndmaster<text:span text:style-name="T6"/></text:p>
        </text:list-item>
        <text:list-item>
          <text:p text:style-name="P7" loext:marker-style-name="T6">Gearjaw<text:span text:style-name="T6"/></text:p>
        </text:list-item>
        <text:list-item>
          <text:p text:style-name="P7" loext:marker-style-name="T6">Automatick<text:span text:style-name="T6"/></text:p>
        </text:list-item>
        <text:list-item>
          <text:p text:style-name="P7" loext:marker-style-name="T6">Camp Physician<text:span text:style-name="T6"/></text:p>
        </text:list-item>
        <text:list-item>
          <text:p text:style-name="P7" loext:marker-style-name="T6">Goblin Ambusher<text:span text:style-name="T6"/></text:p>
        </text:list-item>
        <text:list-item>
          <text:p text:style-name="P7" loext:marker-style-name="T6">Blackthorn Engineer<text:span text:style-name="T6"/></text:p>
        </text:list-item>
        <text:list-item>
          <text:p text:style-name="P7" loext:marker-style-name="T6">Black Powder Keg<text:span text:style-name="T6"/></text:p>
        </text:list-item>
        <text:list-item>
          <text:p text:style-name="P7" loext:marker-style-name="T6">Gilded Cage<text:span text:style-name="T6"/></text:p>
        </text:list-item>
      </text:list>
      <text:p text:style-name="P8" loext:marker-style-name="T7"/>
      <text:p text:style-name="P9" loext:marker-style-name="T5"/>
      <text:p text:style-name="P9" loext:marker-style-name="T5"/>
      <text:p text:style-name="P9" loext:marker-style-name="T5"/>
      <text:p text:style-name="P9" loext:marker-style-name="T5"/>
      <text:p text:style-name="P9" loext:marker-style-name="T5"/>
      <text:p text:style-name="P9" loext:marker-style-name="T5"/>
      <text:p text:style-name="P9" loext:marker-style-name="T5"/>
      <text:p text:style-name="P9" loext:marker-style-name="T5"/>
      <text:p text:style-name="P9" loext:marker-style-name="T5"/>
      <text:p text:style-name="P9" loext:marker-style-name="T5"/>
      <text:p text:style-name="normal" loext:marker-style-name="T5"><text:soft-page-break/><text:span text:style-name="T5">Mirewatch Resistance Starter Deck</text:span><text:span text:style-name="T5"/></text:p>
      <text:p text:style-name="normal">Heroes:</text:p>
      <text:list xml:id="list232435034503314" text:continue-list="list1756522581" text:style-name="WWNum7">
        <text:list-item>
          <text:p text:style-name="P5">Joni Pumpernickle</text:p>
        </text:list-item>
        <text:list-item>
          <text:p text:style-name="P5">Vanya Bluewater</text:p>
        </text:list-item>
        <text:list-item>
          <text:p text:style-name="P5">Reed Baelstone</text:p>
        </text:list-item>
      </text:list>
      <text:p text:style-name="normal"/>
      <text:p text:style-name="normal">Combatant/Recruit:</text:p>
      <text:list xml:id="list232435184607519" text:continue-list="list1278099071" text:style-name="WWNum5">
        <text:list-item>
          <text:p text:style-name="P6">Donella of the Marsh</text:p>
        </text:list-item>
        <text:list-item>
          <text:p text:style-name="P6" loext:marker-style-name="T6">Birdie the Wise<text:span text:style-name="T6"/></text:p>
        </text:list-item>
        <text:list-item>
          <text:p text:style-name="P6" loext:marker-style-name="T6">Scooter (otter)<text:span text:style-name="T6"/></text:p>
        </text:list-item>
        <text:list-item>
          <text:p text:style-name="P6" loext:marker-style-name="T6">Erevan the Shadow<text:span text:style-name="T6"/></text:p>
        </text:list-item>
        <text:list-item>
          <text:p text:style-name="P6" loext:marker-style-name="T6">Rowan Leafbound<text:span text:style-name="T6"/></text:p>
        </text:list-item>
        <text:list-item>
          <text:p text:style-name="P6" loext:marker-style-name="T6">The Ghost of Elliot Greentide<text:span text:style-name="T6"/></text:p>
        </text:list-item>
        <text:list-item>
          <text:p text:style-name="P6" loext:marker-style-name="T6">Resistance Smuggler (goblin)<text:span text:style-name="T6"/></text:p>
        </text:list-item>
        <text:list-item>
          <text:p text:style-name="P6" loext:marker-style-name="T6">Mirewatch Informant<text:span text:style-name="T6"/></text:p>
        </text:list-item>
        <text:list-item>
          <text:p text:style-name="P6" loext:marker-style-name="T6">Swamp Tracker (frog rider)<text:span text:style-name="T6"/></text:p>
        </text:list-item>
        <text:list-item>
          <text:p text:style-name="P6" loext:marker-style-name="T6">Resistance Archer<text:span text:style-name="T6"/></text:p>
        </text:list-item>
      </text:list>
      <text:p text:style-name="normal"/>
      <text:p text:style-name="normal">Mirewatch Resistance Non-Starter Cards:</text:p>
      <text:list text:style-name="WWNum2">
        <text:list-item>
          <text:p text:style-name="P10" loext:marker-style-name="T6">Telos the Merchant<text:span text:style-name="T6"/></text:p>
        </text:list-item>
      </text:list>
      <text:list xml:id="list232433285118585" text:continue-list="list232435184607519" text:style-name="WWNum5">
        <text:list-item>
          <text:p text:style-name="P6" loext:marker-style-name="T6">Marshland Veteran<text:span text:style-name="T6"/></text:p>
        </text:list-item>
        <text:list-item>
          <text:p text:style-name="P6" loext:marker-style-name="T6">Gator Wrangler<text:span text:style-name="T6"/></text:p>
        </text:list-item>
        <text:list-item>
          <text:p text:style-name="P6" loext:marker-style-name="T6">Hedge Witch<text:span text:style-name="T6"/></text:p>
        </text:list-item>
        <text:list-item>
          <text:p text:style-name="P6" loext:marker-style-name="T6">Bog Spearman<text:span text:style-name="T6"/></text:p>
        </text:list-item>
        <text:list-item>
          <text:p text:style-name="P6" loext:marker-style-name="T6">Bayou Denizen<text:span text:style-name="T6"/></text:p>
        </text:list-item>
        <text:list-item>
          <text:p text:style-name="P6" loext:marker-style-name="T6">Old Mags<text:span text:style-name="T6"/></text:p>
        </text:list-item>
        <text:list-item>
          <text:p text:style-name="P6" loext:marker-style-name="T6">River Guide<text:span text:style-name="T6"/></text:p>
        </text:list-item>
        <text:list-item>
          <text:p text:style-name="P6" loext:marker-style-name="T6">Marsh Trapper<text:span text:style-name="T6"/></text:p>
        </text:list-item>
        <text:list-item>
          <text:p text:style-name="P6" loext:marker-style-name="T6">Hidden Camp<text:span text:style-name="T6"/></text:p>
        </text:list-item>
        <text:list-item>
          <text:p text:style-name="P6" loext:marker-style-name="T6">Resistance Cache<text:span text:style-name="T6"/></text:p>
        </text:list-item>
      </text:list>
      <text:p text:style-name="normal"/>
      <text:p text:style-name="P9" loext:marker-style-name="T5"/>
      <text:p text:style-name="P9" loext:marker-style-name="T5"/>
      <text:p text:style-name="P9" loext:marker-style-name="T5"/>
      <text:p text:style-name="P9" loext:marker-style-name="T5"/>
      <text:p text:style-name="P9" loext:marker-style-name="T5"/>
      <text:p text:style-name="P9" loext:marker-style-name="T5"/>
      <text:p text:style-name="P9" loext:marker-style-name="T5"/>
      <text:p text:style-name="P9" loext:marker-style-name="T5"/>
      <text:p text:style-name="P9" loext:marker-style-name="T5"/>
      <text:p text:style-name="P9" loext:marker-style-name="T5"/>
      <text:p text:style-name="P9" loext:marker-style-name="T5"/>
      <text:p text:style-name="normal" loext:marker-style-name="T5"><text:soft-page-break/><text:span text:style-name="T5">Seelie Court Starter Deck</text:span><text:span text:style-name="T5"/></text:p>
      <text:p text:style-name="normal">Heroes:</text:p>
      <text:list xml:id="list232434799764816" text:continue-list="list232435034503314" text:style-name="WWNum7">
        <text:list-item>
          <text:p text:style-name="P5">Prince Vesper</text:p>
        </text:list-item>
        <text:list-item>
          <text:p text:style-name="P5" loext:marker-style-name="T6">Caltheriel<text:span text:style-name="T6"/></text:p>
        </text:list-item>
        <text:list-item>
          <text:p text:style-name="P5">Sylvara</text:p>
        </text:list-item>
      </text:list>
      <text:p text:style-name="normal"/>
      <text:p text:style-name="normal">Combatant/Recruit:</text:p>
      <text:list xml:id="list232434991356532" text:continue-list="list232433285118585" text:style-name="WWNum5">
        <text:list-item>
          <text:p text:style-name="P6">Pavo Quickstep</text:p>
        </text:list-item>
        <text:list-item>
          <text:p text:style-name="P6" loext:marker-style-name="T6">Nettle Starbright (flying snail-riding fairy) (wings were clipped by the bug queen)<text:span text:style-name="T6"/></text:p>
        </text:list-item>
        <text:list-item>
          <text:p text:style-name="P6" loext:marker-style-name="T6">Heartwood (tree)<text:span text:style-name="T6"/></text:p>
        </text:list-item>
        <text:list-item>
          <text:p text:style-name="P6" loext:marker-style-name="T6">Fey Messenger<text:span text:style-name="T6"/></text:p>
        </text:list-item>
        <text:list-item>
          <text:p text:style-name="P6" loext:marker-style-name="T6">Starbloom Knight<text:span text:style-name="T6"/></text:p>
        </text:list-item>
        <text:list-item>
          <text:p text:style-name="P6">Crystal Unicorn</text:p>
        </text:list-item>
        <text:list-item>
          <text:p text:style-name="P6" loext:marker-style-name="T6">Heartwood Sister<text:span text:style-name="T6"/></text:p>
        </text:list-item>
        <text:list-item>
          <text:p text:style-name="P6" loext:marker-style-name="T6">Thorn Griffin<text:span text:style-name="T6"/></text:p>
        </text:list-item>
        <text:list-item>
          <text:p text:style-name="P6" loext:marker-style-name="T6">Sylvan Enchantress<text:span text:style-name="T6"/></text:p>
        </text:list-item>
        <text:list-item>
          <text:p text:style-name="P6" loext:marker-style-name="T6">Sylvan Champion<text:span text:style-name="T6"/></text:p>
        </text:list-item>
      </text:list>
      <text:p text:style-name="normal"/>
      <text:p text:style-name="normal">Seelie Non-Starter Cards:</text:p>
      <text:list text:style-name="WWNum6">
        <text:list-item>
          <text:p text:style-name="P11" loext:marker-style-name="T6">Glimmer Stag<text:span text:style-name="T6"/></text:p>
        </text:list-item>
        <text:list-item>
          <text:p text:style-name="P11" loext:marker-style-name="T6">Moonpetal Oracle<text:span text:style-name="T6"/></text:p>
        </text:list-item>
        <text:list-item>
          <text:p text:style-name="P11" loext:marker-style-name="T6">Ancient Ent<text:span text:style-name="T6"/></text:p>
        </text:list-item>
        <text:list-item>
          <text:p text:style-name="P11" loext:marker-style-name="T6">Moon Herald<text:span text:style-name="T6"/></text:p>
        </text:list-item>
        <text:list-item>
          <text:p text:style-name="P11" loext:marker-style-name="T6">River Nymph<text:span text:style-name="T6"/></text:p>
        </text:list-item>
        <text:list-item>
          <text:p text:style-name="P11" loext:marker-style-name="T6">Sun Sprite<text:span text:style-name="T6"/></text:p>
        </text:list-item>
        <text:list-item>
          <text:p text:style-name="P11" loext:marker-style-name="T6">Mossy Giant<text:span text:style-name="T6"/></text:p>
        </text:list-item>
        <text:list-item>
          <text:p text:style-name="P11" loext:marker-style-name="T6">Glimmer Fox<text:span text:style-name="T6"/></text:p>
        </text:list-item>
        <text:list-item>
          <text:p text:style-name="P11" loext:marker-style-name="T6">Heartwood (tree)<text:span text:style-name="T6"/></text:p>
        </text:list-item>
        <text:list-item>
          <text:p text:style-name="P11" loext:marker-style-name="T6">Moonwell<text:span text:style-name="T6"/></text:p>
        </text:list-item>
      </text:list>
      <text:p text:style-name="normal"/>
      <text:p text:style-name="P9" loext:marker-style-name="T5"/>
      <text:p text:style-name="P9" loext:marker-style-name="T5"/>
      <text:p text:style-name="P9" loext:marker-style-name="T5"/>
      <text:p text:style-name="P9" loext:marker-style-name="T5"/>
      <text:p text:style-name="P9" loext:marker-style-name="T5"/>
      <text:p text:style-name="P9" loext:marker-style-name="T5"/>
      <text:p text:style-name="P9" loext:marker-style-name="T5"/>
      <text:p text:style-name="P9" loext:marker-style-name="T5"/>
      <text:p text:style-name="P9" loext:marker-style-name="T5"/>
      <text:p text:style-name="P9" loext:marker-style-name="T5"/>
      <text:p text:style-name="P9" loext:marker-style-name="T5"/>
      <text:p text:style-name="P9" loext:marker-style-name="T5"/>
      <text:p text:style-name="normal" loext:marker-style-name="T5"><text:soft-page-break/><text:span text:style-name="T5">Unseelie Court Starter Deck</text:span><text:span text:style-name="T5"/></text:p>
      <text:p text:style-name="normal">Heroes:</text:p>
      <text:list text:continue-list="list232434799764816" text:style-name="WWNum7">
        <text:list-item>
          <text:p text:style-name="P5">The Bug Queen</text:p>
        </text:list-item>
        <text:list-item>
          <text:p text:style-name="P5">General Crix</text:p>
        </text:list-item>
        <text:list-item>
          <text:p text:style-name="P5">The Tockman</text:p>
        </text:list-item>
      </text:list>
      <text:p text:style-name="normal"/>
      <text:p text:style-name="normal">Combatant/Recruit:</text:p>
      <text:list text:continue-list="list232434991356532" text:style-name="WWNum5">
        <text:list-item>
          <text:p text:style-name="P6">Briar Whisperthorn</text:p>
        </text:list-item>
        <text:list-item>
          <text:p text:style-name="P6" loext:marker-style-name="T6">Dark Dryad<text:span text:style-name="T6"/></text:p>
        </text:list-item>
        <text:list-item>
          <text:p text:style-name="P6" loext:marker-style-name="T6">Dread Huntsman<text:span text:style-name="T6"/></text:p>
        </text:list-item>
        <text:list-item>
          <text:p text:style-name="P6" loext:marker-style-name="T6">Dusk Harvester<text:span text:style-name="T6"/></text:p>
        </text:list-item>
        <text:list-item>
          <text:p text:style-name="P6" loext:marker-style-name="T6">Rootbound Horror<text:span text:style-name="T6"/></text:p>
        </text:list-item>
        <text:list-item>
          <text:p text:style-name="P6" loext:marker-style-name="T6">Dream Leech<text:span text:style-name="T6"/></text:p>
        </text:list-item>
        <text:list-item>
          <text:p text:style-name="P6" loext:marker-style-name="T6">Nightmare Wolf<text:span text:style-name="T6"/></text:p>
        </text:list-item>
        <text:list-item>
          <text:p text:style-name="P6" loext:marker-style-name="T6">Hexbound Knight<text:span text:style-name="T6"/></text:p>
        </text:list-item>
        <text:list-item>
          <text:p text:style-name="P6" loext:marker-style-name="T6">Whisper Fiend<text:span text:style-name="T6"/></text:p>
        </text:list-item>
        <text:list-item>
          <text:p text:style-name="P6" loext:marker-style-name="T6">Thorn Serpent<text:span text:style-name="T6"/></text:p>
        </text:list-item>
      </text:list>
      <text:p text:style-name="normal"/>
      <text:p text:style-name="normal">Unseelie Non-Starter Cards:</text:p>
      <text:list text:style-name="WWNum4">
        <text:list-item>
          <text:p text:style-name="P12">Doomed Satyr</text:p>
        </text:list-item>
        <text:list-item>
          <text:p text:style-name="P12" loext:marker-style-name="T6">Bog Horror<text:span text:style-name="T6"/></text:p>
        </text:list-item>
        <text:list-item>
          <text:p text:style-name="P12" loext:marker-style-name="T6">Moonshade Stalker<text:span text:style-name="T6"/></text:p>
        </text:list-item>
        <text:list-item>
          <text:p text:style-name="P12" loext:marker-style-name="T6">Mist Hag<text:span text:style-name="T6"/></text:p>
        </text:list-item>
        <text:list-item>
          <text:p text:style-name="P12" loext:marker-style-name="T6">Cursed Larvae<text:span text:style-name="T6"/></text:p>
        </text:list-item>
        <text:list-item>
          <text:p text:style-name="P12" loext:marker-style-name="T6">Gloom Wisp<text:span text:style-name="T6"/></text:p>
        </text:list-item>
        <text:list-item>
          <text:p text:style-name="P12" loext:marker-style-name="T6">Wall of Thorns<text:span text:style-name="T6"/></text:p>
        </text:list-item>
        <text:list-item>
          <text:p text:style-name="P12" loext:marker-style-name="T6">Rootsnare Thicket<text:span text:style-name="T6"/></text:p>
        </text:list-item>
        <text:list-item>
          <text:p text:style-name="P12" loext:marker-style-name="T6">Eyeblight (tree)<text:span text:style-name="T6"/></text:p>
        </text:list-item>
      </text:list>
      <text:p text:style-name="P2" loext:marker-style-name="T2"/>
      <text:p text:style-name="P9" loext:marker-style-name="T5"/>
      <text:p text:style-name="P9" loext:marker-style-name="T5"/>
      <text:p text:style-name="P9" loext:marker-style-name="T5"/>
      <text:p text:style-name="normal" loext:marker-style-name="T5"><text:span text:style-name="T5">Non-Starter Effect Cards:</text:span><text:span text:style-name="T5"/></text:p>
      <text:list text:style-name="WWNum3">
        <text:list-item>
          <text:p text:style-name="P13" loext:marker-style-name="T6">Ambush<text:span text:style-name="T6"/></text:p>
        </text:list-item>
        <text:list-item>
          <text:p text:style-name="P13" loext:marker-style-name="T6">Workers Revolt<text:span text:style-name="T6"/></text:p>
        </text:list-item>
        <text:list-item>
          <text:p text:style-name="P13" loext:marker-style-name="T6">Supply Shortage<text:span text:style-name="T6"/></text:p>
        </text:list-item>
        <text:list-item>
          <text:p text:style-name="P13" loext:marker-style-name="T6">Broken Morale<text:span text:style-name="T6"/></text:p>
        </text:list-item>
        <text:list-item>
          <text:p text:style-name="P13" loext:marker-style-name="T6">Hidden Path<text:span text:style-name="T6"/></text:p>
        </text:list-item>
        <text:list-item>
          <text:p text:style-name="P13" loext:marker-style-name="T6">Dimensional Rift<text:span text:style-name="T6"/></text:p>
        </text:list-item>
        <text:list-item>
          <text:p text:style-name="P13" loext:marker-style-name="T6">Ancient Awakening<text:span text:style-name="T6"/></text:p>
        </text:list-item>
        <text:list-item>
          <text:p text:style-name="P13">Cursed Ground</text:p>
        </text:list-item>
        <text:list-item>
          <text:p text:style-name="P13" loext:marker-style-name="T6">Sabotage<text:span text:style-name="T6"/></text:p>
        </text:list-item>
        <text:list-item>
          <text:p text:style-name="P13" loext:marker-style-name="T6">Last Stand<text:span text:style-name="T6"/></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normal" loext:font-weight="bold">
          <svg:font-face-format svg:string="truetype"/>
        </svg:font-face-uri>
        <svg:font-face-uri xlink:href="Fonts/Font_Lucida_Sans_3.ttf" xlink:type="simple" loext:font-style="italic" loext:font-weight="normal">
          <svg:font-face-format svg:string="truetype"/>
        </svg:font-face-uri>
      </svg:font-face-src>
    </style:font-fac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in" fo:margin-bottom="0in" style:contextual-spacing="false" fo:line-height="115%" fo:text-align="left" style:justify-single-word="false" fo:orphans="2" fo:widows="2" style:writing-mode="lr-tb"/>
    </style:style>
    <style:style style:name="Heading_20_1" style:display-name="Heading 1" style:family="paragraph" style:parent-style-name="normal" style:next-style-name="normal" style:class="chapter">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norma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font-style-complex="italic"/>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0" meta:image-count="0" meta:object-count="0" meta:page-count="7" meta:paragraph-count="149" meta:word-count="1562" meta:character-count="9475" meta:non-whitespace-character-count="8155"/>
    <meta:generator>LibreOffice/26.2.4.2$Windows_X86_64 LibreOffice_project/0229ac93fcf0d7cbc6376066c6f35021cef002dc</meta:generator>
  </office:meta>
</office:document-meta>
</file>